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2000003343E9FBF46.png" manifest:media-type="image/png"/>
  <manifest:file-entry manifest:full-path="Pictures/10000001000003B6000000F7488252BE.png" manifest:media-type="image/png"/>
  <manifest:file-entry manifest:full-path="Pictures/10000001000002E60000003749F2F245.png" manifest:media-type="image/png"/>
  <manifest:file-entry manifest:full-path="Pictures/10000001000003850000038E6CB48D46.png" manifest:media-type="image/png"/>
  <manifest:file-entry manifest:full-path="Pictures/1000000100000385000000EA1DF190A1.png" manifest:media-type="image/png"/>
  <manifest:file-entry manifest:full-path="Pictures/100000010000039C0000010831106B35.png" manifest:media-type="image/png"/>
  <manifest:file-entry manifest:full-path="Pictures/100000010000038500000073FE901F75.png" manifest:media-type="image/png"/>
  <manifest:file-entry manifest:full-path="Pictures/10000001000003C8000000721967A11D.png" manifest:media-type="image/png"/>
  <manifest:file-entry manifest:full-path="Pictures/1000000100000385000000736DA805F6.png" manifest:media-type="image/png"/>
  <manifest:file-entry manifest:full-path="Pictures/10000001000003B0000001BCCBE61C73.png" manifest:media-type="image/png"/>
  <manifest:file-entry manifest:full-path="Pictures/10000001000003850000007392579878.png" manifest:media-type="image/png"/>
  <manifest:file-entry manifest:full-path="Pictures/100000010000039100000091ED989C21.png" manifest:media-type="image/png"/>
  <manifest:file-entry manifest:full-path="Pictures/100000010000039C0000009EFE24A988.png" manifest:media-type="image/png"/>
  <manifest:file-entry manifest:full-path="Pictures/10000001000003BD0000011940E102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3b1" officeooo:paragraph-rsid="000b93b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uía de verificación rápida </text:p>
      <text:p text:style-name="Standard">TFG Laboratorio de Red — ASIR </text:p>
      <text:p text:style-name="Standard">Autor: Abel</text:p>
      <text:p text:style-name="Standard">Fecha: Abril 2026 </text:p>
      <text:p text:style-name="Standard"> Antes de empezar — arrancar el laboratorio </text:p>
      <text:p text:style-name="Standard">Ansible despliega todo el laboratorio desde cero con un único comando. La primera ejecución tarda más porque construye las</text:p>
      <text:p text:style-name="Standard">imágenes Docker — las siguientes son mucho más rápidas al usar la caché. </text:p>
      <text:p text:style-name="Standard">cd ~/tfg-laboratorio-red</text:p>
      <text:p text:style-name="Standard">ansible-playbook site.yml</text:p>
      <text:p text:style-name="Standard"/>
      <text:p text:style-name="Standard"> 1. Redes Docker </text:p>
      <text:p text:style-name="Standard">Verificamos que las tres redes del laboratorio existen y están activas. Cada red representa una zona de seguridad distinta — WAN</text:p>
      <text:p text:style-name="Standard">(exterior), DMZ (servicios expuestos) y LAN (servicios internos). </text:p>
      <text:p text:style-name="Standard">docker network ls --filter driver=bridge</text:p>
      <text:p text:style-name="Standard"/>
      <text:p text:style-name="Standard"><draw:frame draw:style-name="fr2" draw:name="Imagen1" text:anchor-type="char" svg:width="17cm" svg:height="2.699cm" draw:z-index="0"><draw:image xlink:href="Pictures/100000010000039100000091ED989C21.png" xlink:type="simple" xlink:show="embed" xlink:actuate="onLoad" draw:mime-type="image/png"/></draw:frame></text:p>
      <text:p text:style-name="Standard">Esperado: wan_net, dmz_net, lan_net visibles. </text:p>
      <text:p text:style-name="Standard"> 2. Contenedores activos </text:p>
      <text:p text:style-name="Standard">Comprobamos de un vistazo que todos los contenedores están corriendo. Si alguno aparece en estado Exited o Restarting hay</text:p>
      <text:p text:style-name="Standard">un problema que investigar con docker logs &lt;nombre&gt;. </text:p>
      <text:p text:style-name="Standard">docker ps --format "table {{.Names}}\t{{.Status}}\t{{.Ports}}"</text:p>
      <text:p text:style-name="Standard"/>
      <text:p text:style-name="Standard"><draw:frame draw:style-name="fr2" draw:name="Imagen2" text:anchor-type="char" svg:width="17cm" svg:height="4.419cm" draw:z-index="1"><draw:image xlink:href="Pictures/10000001000003B6000000F7488252BE.png" xlink:type="simple" xlink:show="embed" xlink:actuate="onLoad" draw:mime-type="image/png"/></draw:frame></text:p>
      <text:p text:style-name="Standard"/>
      <text:p text:style-name="Standard"/>
      <text:p text:style-name="Standard">Esperado: fw01, ssh01, dns01, dhcp01, web01, proxy01, squid01 en estado Up. </text:p>
      <text:p text:style-name="Standard"> 3. Firewall — fw01 </text:p>
      <text:p text:style-name="Standard"><draw:frame draw:style-name="fr2" draw:name="Imagen3" text:anchor-type="char" svg:width="17cm" svg:height="1.259cm" draw:z-index="2"><draw:image xlink:href="Pictures/10000001000002E60000003749F2F245.png" xlink:type="simple" xlink:show="embed" xlink:actuate="onLoad" draw:mime-type="image/png"/></draw:frame></text:p>
      <text:p text:style-name="Standard">El firewall es el elemento central de la arquitectura — enruta el tráfico entre zonas y aplica las reglas de seguridad con nftables.</text:p>
      <text:p text:style-name="Standard">Verificamos que las reglas están cargadas y que la LAN puede salir a internet a través del NAT. </text:p>
      <text:p text:style-name="Standard"># Ver reglas activas</text:p>
      <text:p text:style-name="Standard"><text:soft-page-break/>docker exec fw01 nft list ruleset</text:p>
      <text:p text:style-name="Standard"/>
      <text:p text:style-name="Standard"><draw:frame draw:style-name="fr2" draw:name="Imagen4" text:anchor-type="char" svg:width="17cm" svg:height="17.17cm" draw:z-index="3"><draw:image xlink:href="Pictures/10000001000003850000038E6CB48D46.png" xlink:type="simple" xlink:show="embed" xlink:actuate="onLoad" draw:mime-type="image/png"/></draw:frame></text:p>
      <text:p text:style-name="Standard"> # LAN puede salir a internet</text:p>
      <text:p text:style-name="Standard">docker exec fw01 ping -c 2 8.8.8.8</text:p>
      <text:p text:style-name="Standard"/>
      <text:p text:style-name="Standard"><draw:frame draw:style-name="fr2" draw:name="Imagen5" text:anchor-type="char" svg:width="17cm" svg:height="4.415cm" draw:z-index="4"><draw:image xlink:href="Pictures/1000000100000385000000EA1DF190A1.png" xlink:type="simple" xlink:show="embed" xlink:actuate="onLoad" draw:mime-type="image/png"/></draw:frame></text:p>
      <text:p text:style-name="Standard"/>
      <text:p text:style-name="Standard"><text:soft-page-break/>Esperado: ruleset con chains input, forward, output y NAT masquerade. Ping responde. </text:p>
      <text:p text:style-name="Standard"/>
      <text:p text:style-name="Standard"> 4. Servidor SSH — ssh01 </text:p>
      <text:p text:style-name="Standard">SSH permite administrar los contenedores de la LAN de forma remota y segura. Verificamos que el servidor escucha en el puerto 22 y</text:p>
      <text:p text:style-name="Standard">acepta conexiones con la contraseña configurada. </text:p>
      <text:p text:style-name="Standard">ssh root@192.168.100.10</text:p>
      <text:p text:style-name="Standard"># Contraseña: laboratorio</text:p>
      <text:p text:style-name="Standard"><draw:frame draw:style-name="fr2" draw:name="Imagen6" text:anchor-type="char" svg:width="17cm" svg:height="2.17cm" draw:z-index="5"><draw:image xlink:href="Pictures/100000010000038500000073FE901F75.png" xlink:type="simple" xlink:show="embed" xlink:actuate="onLoad" draw:mime-type="image/png"/></draw:frame></text:p>
      <text:p text:style-name="Standard">Esperado: acceso correcto al contenedor. hostname devuelve el ID del contenedor. </text:p>
      <text:p text:style-name="Standard"/>
      <text:p text:style-name="Standard"/>
      <text:p text:style-name="Standard"> 5. Servidor DNS — dns01 </text:p>
      <text:p text:style-name="Standard">BIND9 resuelve los nombres del dominio laboratorio.local y reenvía las consultas externas a Google DNS y Cloudflare.</text:p>
      <text:p text:style-name="Standard">Verificamos los tres tipos de resolución: directa interna, inversa y externa. </text:p>
      <text:p text:style-name="Standard"># Resolución interna</text:p>
      <text:p text:style-name="Standard">dig @192.168.100.20 ssh01.laboratorio.local +short</text:p>
      <text:p text:style-name="Standard"><draw:frame draw:style-name="fr2" draw:name="Imagen7" text:anchor-type="char" svg:width="17cm" svg:height="2.17cm" draw:z-index="6"><draw:image xlink:href="Pictures/1000000100000385000000736DA805F6.png" xlink:type="simple" xlink:show="embed" xlink:actuate="onLoad" draw:mime-type="image/png"/></draw:frame></text:p>
      <text:p text:style-name="Standard"> # Resolución inversa</text:p>
      <text:p text:style-name="Standard">dig @192.168.100.20 -x 192.168.100.10 +short</text:p>
      <text:p text:style-name="Standard"/>
      <text:p text:style-name="Standard"><draw:frame draw:style-name="fr2" draw:name="Imagen8" text:anchor-type="char" svg:width="17cm" svg:height="2.17cm" draw:z-index="7"><draw:image xlink:href="Pictures/10000001000003850000007392579878.png" xlink:type="simple" xlink:show="embed" xlink:actuate="onLoad" draw:mime-type="image/png"/></draw:frame></text:p>
      <text:p text:style-name="Standard"> # Resolución externa</text:p>
      <text:p text:style-name="Standard">dig @192.168.100.20 google.com +short</text:p>
      <text:p text:style-name="Standard"/>
      <text:p text:style-name="Standard"><draw:frame draw:style-name="fr2" draw:name="Imagen9" text:anchor-type="char" svg:width="17cm" svg:height="4.856cm" draw:z-index="8"><draw:image xlink:href="Pictures/100000010000039C0000010831106B35.png" xlink:type="simple" xlink:show="embed" xlink:actuate="onLoad" draw:mime-type="image/png"/></draw:frame></text:p>
      <text:p text:style-name="Standard"/>
      <text:p text:style-name="Standard">Esperado: 192.168.100.10, ssh01.laboratorio.local., IP de Google. </text:p>
      <text:p text:style-name="Standard"><text:soft-page-break/> 6. Servidor DHCP — dhcp01 </text:p>
      <text:p text:style-name="Standard">ISC DHCP Server asigna automáticamente IPs del rango 192.168.100.100-200 a los clientes de la LAN. Lanzamos un contenedor</text:p>
      <text:p text:style-name="Standard">Alpine sin IP fija para simular un cliente que se conecta por primera vez. </text:p>
      <text:p text:style-name="Standard"/>
      <text:p text:style-name="Standard">docker run --rm --network lan_net alpine udhcpc -i eth0 -t 5 -n</text:p>
      <text:p text:style-name="Standard"/>
      <text:p text:style-name="Standard"><draw:frame draw:style-name="fr2" draw:name="Imagen10" text:anchor-type="char" svg:width="17cm" svg:height="2.907cm" draw:z-index="9"><draw:image xlink:href="Pictures/100000010000039C0000009EFE24A988.png" xlink:type="simple" xlink:show="embed" xlink:actuate="onLoad" draw:mime-type="image/png"/></draw:frame></text:p>
      <text:p text:style-name="Standard"/>
      <text:p text:style-name="Standard">Esperado: lease of 192.168.100.1xx obtained from 192.168.100.30. </text:p>
      <text:p text:style-name="Standard"> 7. Servidor web — web01 </text:p>
      <text:p text:style-name="Standard">Nginx sirve contenido estático con HTTP y HTTPS usando un certificado SSL autofirmado. El puerto 80 redirige automáticamente a</text:p>
      <text:p text:style-name="Standard">HTTPS — requisito de seguridad básico en cualquier servidor web moderno. </text:p>
      <text:p text:style-name="Standard"># HTTP redirige a HTTPS</text:p>
      <text:p text:style-name="Standard">curl -v http://172.21.0.20 2&gt;&amp;1 | grep "&lt; HTTP"</text:p>
      <text:p text:style-name="Standard"> # HTTPS devuelve la página</text:p>
      <text:p text:style-name="Standard">curl -k https://172.21.0.20 | grep "&lt;title&gt;"</text:p>
      <text:p text:style-name="Standard"/>
      <text:p text:style-name="Standard">Esperado: código 301 en HTTP. Título Laboratorio de Red — TFG ASIR en HTTPS. También verificable desde el navegador en</text:p>
      <text:p text:style-name="Standard">https://172.21.0.20. </text:p>
      <text:p text:style-name="Standard"> 8. Proxy inverso — proxy01 </text:p>
      <text:p text:style-name="Standard">Nginx actúa como único punto de entrada desde el exterior hacia web01. El cliente nunca habla directamente con web01 — proxy01</text:p>
      <text:p text:style-name="Standard">recibe la petición, la reenvía internamente y devuelve la respuesta, ocultando completamente el servidor real. </text:p>
      <text:p text:style-name="Standard"># Acceder a web01 a través del proxy</text:p>
      <text:p text:style-name="Standard">curl -k https://172.21.0.10 | grep "&lt;title&gt;"</text:p>
      <text:p text:style-name="Standard"> # HTTP redirige a HTTPS</text:p>
      <text:p text:style-name="Standard">curl -v http://172.21.0.10 2&gt;&amp;1 | grep "&lt; HTTP"</text:p>
      <text:p text:style-name="Standard"/>
      <text:p text:style-name="Standard"><draw:frame draw:style-name="fr2" draw:name="Imagen11" text:anchor-type="char" svg:width="17cm" svg:height="4.99cm" draw:z-index="10"><draw:image xlink:href="Pictures/10000001000003BD0000011940E10217.png" xlink:type="simple" xlink:show="embed" xlink:actuate="onLoad" draw:mime-type="image/png"/></draw:frame></text:p>
      <text:p text:style-name="Standard"/>
      <text:p text:style-name="Standard">Esperado: misma página que web01 pero accediendo por 172.21.0.10. Código 301 en HTTP. También verificable desde el</text:p>
      <text:p text:style-name="Standard"><text:soft-page-break/>navegador en https://172.21.0.10. </text:p>
      <text:p text:style-name="Standard"><draw:frame draw:style-name="fr3" draw:name="Imagen12" text:anchor-type="char" svg:x="-0.409cm" svg:y="0.058cm" svg:width="17cm" svg:height="9.775cm" draw:z-index="11"><draw:image xlink:href="Pictures/1000000100000592000003343E9FBF46.png" xlink:type="simple" xlink:show="embed" xlink:actuate="onLoad" draw:mime-type="image/png"/></draw:frame></text:p>
      <text:p text:style-name="Standard"/>
      <text:p text:style-name="Standard"/>
      <text:p text:style-name="Standard"> 9. Proxy de salida — squid01Squid intercepta y registra todo el tráfico web saliente de los clientes de la LAN. Abrimos dos terminales — en una monitorizamos los</text:p>
      <text:p text:style-name="Standard">logs en tiempo real y en la otra simulamos una petición a través del proxy para ver cómo queda registrada. </text:p>
      <text:p text:style-name="Standard"># Terminal 1 — monitorizar logs</text:p>
      <text:p text:style-name="Standard">docker exec squid01 tail -f /var/log/squid/access.log</text:p>
      <text:p text:style-name="Standard"> # Terminal 2 — hacer una petición a través del proxy</text:p>
      <text:p text:style-name="Standard">curl -x 192.168.100.40:3128 http://google.com -s -o /dev/null -w "%{http_code}"</text:p>
      <text:p text:style-name="Standard"/>
      <text:p text:style-name="Standard"><draw:frame draw:style-name="fr2" draw:name="Imagen13" text:anchor-type="char" svg:width="17cm" svg:height="2.002cm" draw:z-index="12"><draw:image xlink:href="Pictures/10000001000003C8000000721967A11D.png" xlink:type="simple" xlink:show="embed" xlink:actuate="onLoad" draw:mime-type="image/png"/></draw:frame></text:p>
      <text:p text:style-name="Standard"/>
      <text:p text:style-name="Standard">Esperado: código 301 en Terminal 2. En Terminal 1 aparece una línea de log con TCP_MISS y la URL solicitada. </text:p>
      <text:p text:style-name="Standard"> 10. Verificación rápida completa </text:p>
      <text:p text:style-name="Standard">Una sola vista que resume el estado de todo el laboratorio. Útil al inicio de cada sesión de trabajo para confirmar que todo está en pie</text:p>
      <text:p text:style-name="Standard">antes de continuar. </text:p>
      <text:p text:style-name="Standard">docker ps --format "table {{.Names}}\t{{.Image}}\t{{.Status}}\t{{.Ports}}"</text:p>
      <text:p text:style-name="Standard">docker network ls --filter driver=bridge</text:p>
      <text:p text:style-name="Standard"/>
      <text:p text:style-name="Standard"/>
      <text:p text:style-name="Standard"><draw:frame draw:style-name="fr1" draw:name="Imagen14" text:anchor-type="char" svg:width="17cm" svg:height="7.996cm" draw:z-index="13"><draw:image xlink:href="Pictures/10000001000003B0000001BCCBE61C73.png" xlink:type="simple" xlink:show="embed" xlink:actuate="onLoad" draw:mime-type="image/png"/></draw:frame><text:soft-page-break/></text:p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1:13:51.598129104</meta:creation-date>
    <meta:print-date>2026-04-14T12:06:50.809443868</meta:print-date>
    <dc:date>2026-04-14T19:37:45.157652893</dc:date>
    <meta:editing-duration>PT49M6S</meta:editing-duration>
    <meta:editing-cycles>2</meta:editing-cycles>
    <meta:generator>LibreOffice/24.2.7.2$Linux_X86_64 LibreOffice_project/420$Build-2</meta:generator>
    <meta:document-statistic meta:table-count="0" meta:image-count="14" meta:object-count="0" meta:page-count="6" meta:paragraph-count="78" meta:word-count="692" meta:character-count="4586" meta:non-whitespace-character-count="3910"/>
  </office:meta>
</office:document-meta>
</file>